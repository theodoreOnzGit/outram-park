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007in" table:align="left"/>
    </style:style>
    <style:style style:name="Table1.A" style:family="table-column">
      <style:table-column-properties style:column-width="1.7903in"/>
    </style:style>
    <style:style style:name="Table1.B" style:family="table-column">
      <style:table-column-properties style:column-width="1.634in"/>
    </style:style>
    <style:style style:name="Table1.C" style:family="table-column">
      <style:table-column-properties style:column-width="2.0181in"/>
    </style:style>
    <style:style style:name="Table1.D" style:family="table-column">
      <style:table-column-properties style:column-width="1.358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208in"/>
    </style:style>
    <style:style style:name="Table2.B" style:family="table-column">
      <style:table-column-properties style:column-width="1.7243in"/>
    </style:style>
    <style:style style:name="Table2.C" style:family="table-column">
      <style:table-column-properties style:column-width="2.1611in"/>
    </style:style>
    <style:style style:name="Table2.D" style:family="table-column">
      <style:table-column-properties style:column-width="1.918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7">
      <style:paragraph-properties fo:margin-top="0in" fo:margin-bottom="0in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8">
      <style:paragraph-properties fo:margin-top="0in" fo:margin-bottom="0in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9">
      <style:paragraph-properties fo:margin-top="0in" fo:margin-bottom="0in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in" fo:margin-bottom="0in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in" fo:margin-bottom="0in" style:contextual-spacing="false"/>
    </style:style>
    <style:style style:name="P64" style:family="paragraph" style:parent-style-name="Text_20_body" style:list-style-name="L32">
      <style:paragraph-properties fo:margin-top="0in" fo:margin-bottom="0in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3">
      <style:paragraph-properties fo:margin-top="0in" fo:margin-bottom="0in" style:contextual-spacing="false"/>
    </style:style>
    <style:style style:name="P67" style:family="paragraph" style:parent-style-name="Text_20_body" style:list-style-name="L33"/>
    <style:style style:name="P68" style:family="paragraph" style:parent-style-name="Preformatted_20_Text">
      <style:paragraph-properties fo:margin-top="0in" fo:margin-bottom="0.1965in" style:contextual-spacing="false"/>
    </style:style>
    <style:style style:name="P69" style:family="paragraph" style:parent-style-name="Text_20_body" style:list-style-name="L34">
      <style:paragraph-properties fo:margin-top="0in" fo:margin-bottom="0in" style:contextual-spacing="false"/>
    </style:style>
    <style:style style:name="P70" style:family="paragraph" style:parent-style-name="Text_20_body" style:list-style-name="L34"/>
    <style:style style:name="P71" style:family="paragraph" style:parent-style-name="Text_20_body" style:list-style-name="L35">
      <style:paragraph-properties fo:margin-top="0in" fo:margin-bottom="0in" style:contextual-spacing="false"/>
    </style:style>
    <style:style style:name="P72" style:family="paragraph" style:parent-style-name="Text_20_body" style:list-style-name="L35"/>
    <style:style style:name="P73" style:family="paragraph" style:parent-style-name="Text_20_body" style:list-style-name="L36"/>
    <style:style style:name="P74" style:family="paragraph" style:parent-style-name="Text_20_body" style:list-style-name="L36">
      <style:paragraph-properties fo:margin-top="0in" fo:margin-bottom="0in" style:contextual-spacing="false"/>
    </style:style>
    <style:style style:name="P75" style:family="paragraph" style:parent-style-name="Text_20_body" style:list-style-name="L37"/>
    <style:style style:name="P76" style:family="paragraph" style:parent-style-name="Text_20_body" style:list-style-name="L37">
      <style:paragraph-properties fo:margin-top="0in" fo:margin-bottom="0in" style:contextual-spacing="false"/>
    </style:style>
    <style:style style:name="P77" style:family="paragraph" style:parent-style-name="Text_20_body" style:list-style-name="L38">
      <style:paragraph-properties fo:margin-top="0in" fo:margin-bottom="0in" style:contextual-spacing="false"/>
    </style:style>
    <style:style style:name="P78" style:family="paragraph" style:parent-style-name="Text_20_body" style:list-style-name="L38"/>
    <style:style style:name="P79" style:family="paragraph" style:parent-style-name="Text_20_body" style:list-style-name="L39">
      <style:paragraph-properties fo:margin-top="0in" fo:margin-bottom="0in" style:contextual-spacing="false"/>
    </style:style>
    <style:style style:name="P80" style:family="paragraph" style:parent-style-name="Text_20_body" style:list-style-name="L39"/>
    <style:style style:name="P81" style:family="paragraph" style:parent-style-name="Text_20_body" style:list-style-name="L40">
      <style:paragraph-properties fo:margin-top="0in" fo:margin-bottom="0in" style:contextual-spacing="false"/>
    </style:style>
    <style:style style:name="P82" style:family="paragraph" style:parent-style-name="Text_20_body" style:list-style-name="L40"/>
    <style:style style:name="P83" style:family="paragraph" style:parent-style-name="Text_20_body" style:list-style-name="L41">
      <style:paragraph-properties fo:margin-top="0in" fo:margin-bottom="0in" style:contextual-spacing="false"/>
    </style:style>
    <style:style style:name="P84" style:family="paragraph" style:parent-style-name="Text_20_body" style:list-style-name="L41"/>
    <style:style style:name="P85" style:family="paragraph" style:parent-style-name="Text_20_body" style:list-style-name="L42">
      <style:paragraph-properties fo:margin-top="0in" fo:margin-bottom="0in" style:contextual-spacing="false"/>
    </style:style>
    <style:style style:name="P86" style:family="paragraph" style:parent-style-name="Text_20_body" style:list-style-name="L42"/>
    <style:style style:name="P87" style:family="paragraph" style:parent-style-name="Text_20_body" style:list-style-name="L43">
      <style:paragraph-properties fo:margin-top="0in" fo:margin-bottom="0in" style:contextual-spacing="false"/>
    </style:style>
    <style:style style:name="P88" style:family="paragraph" style:parent-style-name="Text_20_body" style:list-style-name="L43"/>
    <style:style style:name="P89" style:family="paragraph" style:parent-style-name="Text_20_body" style:list-style-name="L44">
      <style:paragraph-properties fo:margin-top="0in" fo:margin-bottom="0in" style:contextual-spacing="false"/>
    </style:style>
    <style:style style:name="P90" style:family="paragraph" style:parent-style-name="Text_20_body" style:list-style-name="L44"/>
    <style:style style:name="P91" style:family="paragraph" style:parent-style-name="Text_20_body" style:list-style-name="L45">
      <style:paragraph-properties fo:margin-top="0in" fo:margin-bottom="0in" style:contextual-spacing="false"/>
    </style:style>
    <style:style style:name="P92" style:family="paragraph" style:parent-style-name="Text_20_body" style:list-style-name="L45"/>
    <style:style style:name="P93" style:family="paragraph" style:parent-style-name="Text_20_body" style:list-style-name="L46">
      <style:paragraph-properties fo:margin-top="0in" fo:margin-bottom="0in" style:contextual-spacing="false"/>
    </style:style>
    <style:style style:name="P94" style:family="paragraph" style:parent-style-name="Text_20_body" style:list-style-name="L46"/>
    <style:style style:name="P95" style:family="paragraph" style:parent-style-name="Text_20_body" style:list-style-name="L47">
      <style:paragraph-properties fo:margin-top="0in" fo:margin-bottom="0in" style:contextual-spacing="false"/>
    </style:style>
    <style:style style:name="P96" style:family="paragraph" style:parent-style-name="Text_20_body" style:list-style-name="L47"/>
    <style:style style:name="P97" style:family="paragraph" style:parent-style-name="Text_20_body" style:list-style-name="L48">
      <style:paragraph-properties fo:margin-top="0in" fo:margin-bottom="0in" style:contextual-spacing="false"/>
    </style:style>
    <style:style style:name="P98" style:family="paragraph" style:parent-style-name="Text_20_body" style:list-style-name="L48"/>
    <style:style style:name="P99" style:family="paragraph" style:parent-style-name="Text_20_body" style:list-style-name="L49">
      <style:paragraph-properties fo:margin-top="0in" fo:margin-bottom="0in" style:contextual-spacing="false"/>
    </style:style>
    <style:style style:name="P100" style:family="paragraph" style:parent-style-name="Text_20_body" style:list-style-name="L49"/>
    <style:style style:name="P101" style:family="paragraph" style:parent-style-name="Text_20_body" style:list-style-name="L50">
      <style:paragraph-properties fo:margin-top="0in" fo:margin-bottom="0in" style:contextual-spacing="false"/>
    </style:style>
    <style:style style:name="P102" style:family="paragraph" style:parent-style-name="Text_20_body" style:list-style-name="L50"/>
    <style:style style:name="P103" style:family="paragraph" style:parent-style-name="Text_20_body" style:list-style-name="L51">
      <style:paragraph-properties fo:margin-top="0in" fo:margin-bottom="0in" style:contextual-spacing="false"/>
    </style:style>
    <style:style style:name="P104" style:family="paragraph" style:parent-style-name="Text_20_body" style:list-style-name="L51"/>
    <style:style style:name="P105" style:family="paragraph" style:parent-style-name="Text_20_body" style:list-style-name="L52">
      <style:paragraph-properties fo:margin-top="0in" fo:margin-bottom="0in" style:contextual-spacing="false"/>
    </style:style>
    <style:style style:name="P106" style:family="paragraph" style:parent-style-name="Text_20_body" style:list-style-name="L52"/>
    <style:style style:name="P107" style:family="paragraph" style:parent-style-name="Text_20_body" style:list-style-name="L53">
      <style:paragraph-properties fo:margin-top="0in" fo:margin-bottom="0in" style:contextual-spacing="false"/>
    </style:style>
    <style:style style:name="P108" style:family="paragraph" style:parent-style-name="Text_20_body" style:list-style-name="L53"/>
    <style:style style:name="P109" style:family="paragraph" style:parent-style-name="Text_20_body" style:list-style-name="L54">
      <style:paragraph-properties fo:margin-top="0in" fo:margin-bottom="0in" style:contextual-spacing="false"/>
    </style:style>
    <style:style style:name="P110" style:family="paragraph" style:parent-style-name="Text_20_body" style:list-style-name="L54"/>
    <style:style style:name="P111" style:family="paragraph" style:parent-style-name="Text_20_body" style:list-style-name="L55">
      <style:paragraph-properties fo:margin-top="0in" fo:margin-bottom="0in" style:contextual-spacing="false"/>
    </style:style>
    <style:style style:name="P112" style:family="paragraph" style:parent-style-name="Text_20_body" style:list-style-name="L55"/>
    <style:style style:name="P113" style:family="paragraph" style:parent-style-name="Text_20_body" style:list-style-name="L56">
      <style:paragraph-properties fo:margin-top="0in" fo:margin-bottom="0in" style:contextual-spacing="false"/>
    </style:style>
    <style:style style:name="P114" style:family="paragraph" style:parent-style-name="Text_20_body" style:list-style-name="L56"/>
    <style:style style:name="P115" style:family="paragraph" style:parent-style-name="Text_20_body" style:list-style-name="L57">
      <style:paragraph-properties fo:margin-top="0in" fo:margin-bottom="0in" style:contextual-spacing="false"/>
    </style:style>
    <style:style style:name="P116" style:family="paragraph" style:parent-style-name="Text_20_body" style:list-style-name="L57"/>
    <style:style style:name="P117" style:family="paragraph" style:parent-style-name="Text_20_body" style:list-style-name="L58">
      <style:paragraph-properties fo:margin-top="0in" fo:margin-bottom="0in" style:contextual-spacing="false"/>
    </style:style>
    <style:style style:name="P118" style:family="paragraph" style:parent-style-name="Text_20_body" style:list-style-name="L58"/>
    <style:style style:name="P119" style:family="paragraph" style:parent-style-name="Text_20_body" style:list-style-name="L59">
      <style:paragraph-properties fo:margin-top="0in" fo:margin-bottom="0in" style:contextual-spacing="false"/>
    </style:style>
    <style:style style:name="P120" style:family="paragraph" style:parent-style-name="Text_20_body" style:list-style-name="L59"/>
    <style:style style:name="P121" style:family="paragraph" style:parent-style-name="Text_20_body" style:list-style-name="L60">
      <style:paragraph-properties fo:margin-top="0in" fo:margin-bottom="0in" style:contextual-spacing="false"/>
    </style:style>
    <style:style style:name="P122" style:family="paragraph" style:parent-style-name="Text_20_body" style:list-style-name="L60"/>
    <style:style style:name="P123" style:family="paragraph" style:parent-style-name="Text_20_body" style:list-style-name="L61">
      <style:paragraph-properties fo:margin-top="0in" fo:margin-bottom="0in" style:contextual-spacing="false"/>
    </style:style>
    <style:style style:name="P124" style:family="paragraph" style:parent-style-name="Text_20_body" style:list-style-name="L61"/>
    <style:style style:name="P125" style:family="paragraph" style:parent-style-name="Text_20_body" style:list-style-name="L62">
      <style:paragraph-properties fo:margin-top="0in" fo:margin-bottom="0in" style:contextual-spacing="false"/>
    </style:style>
    <style:style style:name="P126" style:family="paragraph" style:parent-style-name="Text_20_body" style:list-style-name="L62"/>
    <style:style style:name="P127" style:family="paragraph" style:parent-style-name="Text_20_body" style:list-style-name="L63">
      <style:paragraph-properties fo:margin-top="0in" fo:margin-bottom="0in" style:contextual-spacing="false"/>
    </style:style>
    <style:style style:name="P128" style:family="paragraph" style:parent-style-name="Text_20_body" style:list-style-name="L63"/>
    <style:style style:name="P129" style:family="paragraph" style:parent-style-name="Text_20_body" style:list-style-name="L64">
      <style:paragraph-properties fo:margin-top="0in" fo:margin-bottom="0in" style:contextual-spacing="false"/>
    </style:style>
    <style:style style:name="P130" style:family="paragraph" style:parent-style-name="Text_20_body" style:list-style-name="L64"/>
    <style:style style:name="P131" style:family="paragraph" style:parent-style-name="Text_20_body" style:list-style-name="L65">
      <style:paragraph-properties fo:margin-top="0in" fo:margin-bottom="0in" style:contextual-spacing="false"/>
    </style:style>
    <style:style style:name="P132" style:family="paragraph" style:parent-style-name="Text_20_body" style:list-style-name="L65"/>
    <style:style style:name="P133" style:family="paragraph" style:parent-style-name="Text_20_body" style:list-style-name="L66">
      <style:paragraph-properties fo:margin-top="0in" fo:margin-bottom="0in" style:contextual-spacing="false"/>
    </style:style>
    <style:style style:name="P134" style:family="paragraph" style:parent-style-name="Text_20_body" style:list-style-name="L66"/>
    <style:style style:name="P135" style:family="paragraph" style:parent-style-name="Text_20_body" style:list-style-name="L67">
      <style:paragraph-properties fo:margin-top="0in" fo:margin-bottom="0in" style:contextual-spacing="false"/>
    </style:style>
    <style:style style:name="P136" style:family="paragraph" style:parent-style-name="Text_20_body" style:list-style-name="L67"/>
    <style:style style:name="P137" style:family="paragraph" style:parent-style-name="Text_20_body" style:list-style-name="L68">
      <style:paragraph-properties fo:margin-top="0in" fo:margin-bottom="0in" style:contextual-spacing="false"/>
    </style:style>
    <style:style style:name="P138" style:family="paragraph" style:parent-style-name="Text_20_body" style:list-style-name="L68"/>
    <style:style style:name="P139" style:family="paragraph" style:parent-style-name="Text_20_body" style:list-style-name="L69">
      <style:paragraph-properties fo:margin-top="0in" fo:margin-bottom="0in" style:contextual-spacing="false"/>
    </style:style>
    <style:style style:name="P140" style:family="paragraph" style:parent-style-name="Text_20_body" style:list-style-name="L69"/>
    <style:style style:name="P141" style:family="paragraph" style:parent-style-name="Text_20_body" style:list-style-name="L70">
      <style:paragraph-properties fo:margin-top="0in" fo:margin-bottom="0in" style:contextual-spacing="false"/>
    </style:style>
    <style:style style:name="P142" style:family="paragraph" style:parent-style-name="Text_20_body" style:list-style-name="L70"/>
    <style:style style:name="P143" style:family="paragraph" style:parent-style-name="Text_20_body" style:list-style-name="L71">
      <style:paragraph-properties fo:margin-top="0in" fo:margin-bottom="0in" style:contextual-spacing="false"/>
    </style:style>
    <style:style style:name="P144" style:family="paragraph" style:parent-style-name="Text_20_body" style:list-style-name="L71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answer-container-LLM-bbbbaf3c-2e1a-5eff-a247-1a819258cc8c">
        <text:section text:style-name="Sect1" text:name="math-container-LLM-bbbbaf3c-2e1a-5eff-a247-1a819258cc8c">
          <text:p text:style-name="P1">Excellent addition! The AP1000 is highly relevant - it's a well-known Gen III+ reactor with passive safety that Singapore has specifically studied. Here's the revised presentation:</text:p>
          <text:h text:style-name="Heading_20_2" text:outline-level="2"><text:span text:style-name="Strong_20_Emphasis">Presentation Structure</text:span></text:h>
          <text:h text:style-name="Heading_20_3" text:outline-level="3"><text:span text:style-name="Strong_20_Emphasis">Part 1: Introduction (5-7 minutes)</text:span></text:h>
          <text:p text:style-name="Text_20_body"><text:span text:style-name="Strong_20_Emphasis">Opening hook:</text:span> "What if I told you that you could cause a reactor accident right now, and see exactly why it won't lead to disaster?"</text:p>
          <text:p text:style-name="Text_20_body"><text:span text:style-name="Strong_20_Emphasis">Key message:</text:span> Modern reactors, especially SMRs and advanced designs like the AP1000, are designed with <text:span text:style-name="Emphasis">passive safety</text:span> - physics does the work, not human operators or powered systems.</text:p>
          <text:p text:style-name="Text_20_body"><text:span text:style-name="Strong_20_Emphasis">Set up the two questions:</text:span></text:p>
          <text:list text:style-name="L1">
            <text:list-item>
              <text:p text:style-name="P2">What makes SMRs and advanced reactors (like AP1000) different and safer than traditional reactors? </text:p>
            </text:list-item>
            <text:list-item>
              <text:p text:style-name="P3">What actually happens when things go wrong? </text:p>
            </text:list-item>
          </text:list>
          <text:h text:style-name="Heading_20_3" text:outline-level="3"><text:span text:style-name="Strong_20_Emphasis">Part 2: Modern Reactors vs Traditional Reactors (12-15 minutes)</text:span></text:h>
          <text:p text:style-name="Text_20_body"><text:span text:style-name="Strong_20_Emphasis">Narrative approach:</text:span></text:p>
          <text:list text:style-name="L2">
            <text:list-item>
              <text:p text:style-name="P4"><text:span text:style-name="Strong_20_Emphasis">Traditional reactors (Gen II):</text:span> Large, complex, require active cooling systems (pumps, power, human intervention)</text:p>
              <text:list>
                <text:list-item>
                  <text:p text:style-name="P5">Examples: Fukushima Daiichi, most operating reactors worldwide </text:p>
                </text:list-item>
                <text:list-item>
                  <text:p text:style-name="P5">Multiple active safety systems needed </text:p>
                </text:list-item>
              </text:list>
            </text:list-item>
            <text:list-item>
              <text:p text:style-name="P4"><text:span text:style-name="Strong_20_Emphasis">Advanced Large Reactors (Gen III/III+):</text:span> Improved safety through passive features</text:p>
              <text:list>
                <text:list-item>
                  <text:p text:style-name="P5"><text:span text:style-name="Strong_20_Emphasis">AP1000 specifically:</text:span> 1000 MWe Westinghouse design with passive safety systems </text:p>
                </text:list-item>
                <text:list-item>
                  <text:p text:style-name="P5">Used in China (Sanmen, Haiyang), under construction in USA </text:p>
                </text:list-item>
                <text:list-item>
                  <text:p text:style-name="P5"><text:span text:style-name="Strong_20_Emphasis">Singapore context:</text:span> Government has studied AP1000 as potential option </text:p>
                </text:list-item>
              </text:list>
            </text:list-item>
            <text:list-item>
              <text:p text:style-name="P4"><text:span text:style-name="Strong_20_Emphasis">SMRs (Small Modular Reactors):</text:span> Smaller scale, enhanced passive safety</text:p>
              <text:list>
                <text:list-item>
                  <text:p text:style-name="P5">Your FHR specifically: Fluoride salt cooling, high temperature operation </text:p>
                </text:list-item>
                <text:list-item>
                  <text:p text:style-name="P5">Factory-built, modular construction </text:p>
                </text:list-item>
                <text:list-item>
                  <text:p text:style-name="P4">Even greater reliance on passive physics </text:p>
                </text:list-item>
              </text:list>
            </text:list-item>
          </text:list>
          <text:p text:style-name="Text_20_body"><text:span text:style-name="Strong_20_Emphasis">Key concept - The Passive Safety Revolution:</text:span></text:p>
          <text:p text:style-name="Text_20_body">Create a comparison table/slide: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header-rows>
              <table:table-row>
                <table:table-cell table:style-name="Table1.A1" office:value-type="string">
                  <text:p text:style-name="Table_20_Heading">Feature</text:p>
                </table:table-cell>
                <table:table-cell table:style-name="Table1.A1" office:value-type="string">
                  <text:p text:style-name="Table_20_Heading">Traditional (Gen II)</text:p>
                </table:table-cell>
                <table:table-cell table:style-name="Table1.A1" office:value-type="string">
                  <text:p text:style-name="Table_20_Heading">AP1000 (Gen III+)</text:p>
                </table:table-cell>
                <table:table-cell table:style-name="Table1.A1" office:value-type="string">
                  <text:p text:style-name="Table_20_Heading">SMRs (like FHR)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Size</text:p>
              </table:table-cell>
              <table:table-cell table:style-name="Table1.A1" office:value-type="string">
                <text:p text:style-name="Table_20_Contents">1000+ MWe</text:p>
              </table:table-cell>
              <table:table-cell table:style-name="Table1.A1" office:value-type="string">
                <text:p text:style-name="Table_20_Contents">1000 MWe</text:p>
              </table:table-cell>
              <table:table-cell table:style-name="Table1.A1" office:value-type="string">
                <text:p text:style-name="Table_20_Contents">50-300 MWe</text:p>
              </table:table-cell>
            </table:table-row>
            <table:table-row>
              <table:table-cell table:style-name="Table1.A1" office:value-type="string">
                <text:p text:style-name="Table_20_Contents">Emergency cooling</text:p>
              </table:table-cell>
              <table:table-cell table:style-name="Table1.A1" office:value-type="string">
                <text:p text:style-name="Table_20_Contents">Active pumps + diesels</text:p>
              </table:table-cell>
              <table:table-cell table:style-name="Table1.A1" office:value-type="string">
                <text:p text:style-name="Table_20_Contents">Passive + 72hr active backup</text:p>
              </table:table-cell>
              <table:table-cell table:style-name="Table1.A1" office:value-type="string">
                <text:p text:style-name="Table_20_Contents">Fully passive</text:p>
              </table:table-cell>
            </table:table-row>
            <table:table-row>
              <table:table-cell table:style-name="Table1.A1" office:value-type="string">
                <text:p text:style-name="Table_20_Contents">Containment cooling</text:p>
              </table:table-cell>
              <table:table-cell table:style-name="Table1.A1" office:value-type="string">
                <text:p text:style-name="Table_20_Contents">Spray pumps</text:p>
              </table:table-cell>
              <table:table-cell table:style-name="Table1.A1" office:value-type="string">
                <text:p text:style-name="Table_20_Contents">Passive air/water</text:p>
              </table:table-cell>
              <table:table-cell table:style-name="Table1.A1" office:value-type="string">
                <text:p text:style-name="Table_20_Contents">Natural circulation</text:p>
              </table:table-cell>
            </table:table-row>
            <table:table-row>
              <table:table-cell table:style-name="Table1.A1" office:value-type="string">
                <text:p text:style-name="Table_20_Contents">Power needed in accident</text:p>
              </table:table-cell>
              <table:table-cell table:style-name="Table1.A1" office:value-type="string">
                <text:p text:style-name="Table_20_Contents">Yes - critical</text:p>
              </table:table-cell>
              <table:table-cell table:style-name="Table1.A1" office:value-type="string">
                <text:p text:style-name="Table_20_Contents">No for 72+ hours</text:p>
              </table:table-cell>
              <table:table-cell table:style-name="Table1.A1" office:value-type="string">
                <text:p text:style-name="Table_20_Contents">No - indefinitely</text:p>
              </table:table-cell>
            </table:table-row>
            <text:soft-page-break/>
            <table:table-row>
              <table:table-cell table:style-name="Table1.A1" office:value-type="string">
                <text:p text:style-name="Table_20_Contents">Operator action time</text:p>
              </table:table-cell>
              <table:table-cell table:style-name="Table1.A1" office:value-type="string">
                <text:p text:style-name="Table_20_Contents">Minutes</text:p>
              </table:table-cell>
              <table:table-cell table:style-name="Table1.A1" office:value-type="string">
                <text:p text:style-name="Table_20_Contents">Days</text:p>
              </table:table-cell>
              <table:table-cell table:style-name="Table1.A1" office:value-type="string">
                <text:p text:style-name="Table_20_Contents">Days to weeks</text:p>
              </table:table-cell>
            </table:table-row>
          </table:table>
          <text:p text:style-name="Text_20_body"><text:span text:style-name="Strong_20_Emphasis">Singapore-specific context:</text:span></text:p>
          <text:list text:style-name="L3">
            <text:list-item>
              <text:p text:style-name="P6">"Our government's pre-feasibility study looked at AP1000 technology" </text:p>
            </text:list-item>
            <text:list-item>
              <text:p text:style-name="P6">"Understanding these safety principles applies to both large and small reactors" </text:p>
            </text:list-item>
            <text:list-item>
              <text:p text:style-name="P7">"The question isn't just 'which reactor' but 'how does passive safety actually work?'" </text:p>
            </text:list-item>
          </text:list>
          <text:p text:style-name="Text_20_body"><text:span text:style-name="Strong_20_Emphasis">Simulator Demo 1 - Normal Operation:</text:span></text:p>
          <text:list text:style-name="L4">
            <text:list-item>
              <text:p text:style-name="P8">Show your FHR running at steady state </text:p>
            </text:list-item>
            <text:list-item>
              <text:p text:style-name="P8">Point out: temperatures, flow rates, power output, steam cycle </text:p>
            </text:list-item>
            <text:list-item>
              <text:p text:style-name="P8"><text:span text:style-name="Strong_20_Emphasis">Key insight:</text:span> "Notice the secondary loop - this is similar to AP1000's steam cycle, but our primary coolant is salt instead of water" </text:p>
            </text:list-item>
            <text:list-item>
              <text:p text:style-name="P8"><text:span text:style-name="Strong_20_Emphasis">Passive features to highlight:</text:span> </text:p>
              <text:list>
                <text:list-item>
                  <text:p text:style-name="P8">Natural circulation capability </text:p>
                </text:list-item>
                <text:list-item>
                  <text:p text:style-name="P8">Negative temperature feedback </text:p>
                </text:list-item>
                <text:list-item>
                  <text:p text:style-name="P9">Decay heat removal paths </text:p>
                </text:list-item>
              </text:list>
            </text:list-item>
          </text:list>
          <text:p text:style-name="Text_20_body"><text:span text:style-name="Strong_20_Emphasis">Explain the common principle:</text:span></text:p>
          <text:list text:style-name="L5">
            <text:list-item>
              <text:p text:style-name="P10">"Both AP1000 and SMRs use gravity, convection, and evaporation - not pumps" </text:p>
            </text:list-item>
            <text:list-item>
              <text:p text:style-name="P11">"Your simulator demonstrates these physics principles that apply across modern reactor designs" </text:p>
            </text:list-item>
          </text:list>
          <text:h text:style-name="Heading_20_3" text:outline-level="3"><text:span text:style-name="Strong_20_Emphasis">Part 3: Accident Scenarios - The Main Event (25-30 minutes)</text:span></text:h>
          <text:p text:style-name="Text_20_body"><text:span text:style-name="Strong_20_Emphasis">Introduction to this section:</text:span> "Now let's test these passive safety claims. I'm going to cause accidents that would have been catastrophic in older reactors. Watch what happens with modern passive safety design."</text:p>
          <text:p text:style-name="Text_20_body"><text:span text:style-name="Strong_20_Emphasis">Scenario 1: Loss of Coolant Accident (LOCA)</text:span></text:p>
          <text:p text:style-name="Text_20_body"><text:span text:style-name="Strong_20_Emphasis">Context setting:</text:span></text:p>
          <text:list text:style-name="L6">
            <text:list-item>
              <text:p text:style-name="P12">"This is what happened at Three Mile Island in 1979 - a small pipe break" </text:p>
            </text:list-item>
            <text:list-item>
              <text:p text:style-name="P12">"In AP1000 design, passive core cooling system activates automatically" </text:p>
            </text:list-item>
            <text:list-item>
              <text:p text:style-name="P13">"Let's see how our SMR responds to the same challenge" </text:p>
            </text:list-item>
          </text:list>
          <text:p text:style-name="Text_20_body"><text:span text:style-name="Strong_20_Emphasis">Simulator action:</text:span> Trigger LOCA in your FHR simulator</text:p>
          <text:p text:style-name="Text_20_body"><text:span text:style-name="Strong_20_Emphasis">Narrate what happens:</text:span></text:p>
          <text:list text:style-name="L7">
            <text:list-item>
              <text:p text:style-name="P14">Temperature initially rises (show the spike) </text:p>
            </text:list-item>
            <text:list-item>
              <text:p text:style-name="P14">Passive safety systems engage (identify which ones) </text:p>
            </text:list-item>
            <text:list-item>
              <text:p text:style-name="P14">Natural circulation begins (show flow patterns if possible) </text:p>
            </text:list-item>
            <text:list-item>
              <text:p text:style-name="P14">System reaches safe stable state </text:p>
            </text:list-item>
            <text:list-item>
              <text:p text:style-name="P15"><text:span text:style-name="Strong_20_Emphasis">Point out time scales:</text:span> "Notice this takes hours, not seconds - plenty of time" </text:p>
            </text:list-item>
          </text:list>
          <text:p text:style-name="Text_20_body"><text:span text:style-name="Strong_20_Emphasis">AP1000 comparison:</text:span></text:p>
          <text:list text:style-name="L8">
            <text:list-item>
              <text:p text:style-name="P16"><text:soft-page-break/>"In AP1000, gravity-driven water from tanks floods the core" </text:p>
            </text:list-item>
            <text:list-item>
              <text:p text:style-name="P16">"In our FHR, natural circulation and salt properties provide cooling" </text:p>
            </text:list-item>
            <text:list-item>
              <text:p text:style-name="P17">"Different mechanisms, same principle: gravity and physics, not pumps" </text:p>
            </text:list-item>
          </text:list>
          <text:p text:style-name="Text_20_body"><text:span text:style-name="Strong_20_Emphasis">Key message:</text:span> "No human intervention needed. No power needed. Physics prevents meltdown."</text:p>
          <text:p text:style-name="Text_20_body"><text:span text:style-name="Strong_20_Emphasis">Scenario 2: Loss of Power (Station Blackout)</text:span></text:p>
          <text:p text:style-name="Text_20_body"><text:span text:style-name="Strong_20_Emphasis">Context setting:</text:span></text:p>
          <text:list text:style-name="L9">
            <text:list-item>
              <text:p text:style-name="P18">"This is what happened at Fukushima - earthquake knocked out grid, tsunami flooded diesels" </text:p>
            </text:list-item>
            <text:list-item>
              <text:p text:style-name="P18">"Batteries lasted hours, then ran out" </text:p>
            </text:list-item>
            <text:list-item>
              <text:p text:style-name="P19">"Fukushima reactors: Gen II design, needed active cooling" </text:p>
            </text:list-item>
          </text:list>
          <text:p text:style-name="Text_20_body"><text:span text:style-name="Strong_20_Emphasis">AP1000 approach:</text:span></text:p>
          <text:list text:style-name="L10">
            <text:list-item>
              <text:p text:style-name="P20">"AP1000 can go 72+ hours with no power, no operator action" </text:p>
            </text:list-item>
            <text:list-item>
              <text:p text:style-name="P20">"Passive Containment Cooling System uses outside air and water evaporation" </text:p>
            </text:list-item>
            <text:list-item>
              <text:p text:style-name="P21">"Gravity-fed water tanks, air-cooled heat exchangers" </text:p>
            </text:list-item>
          </text:list>
          <text:p text:style-name="Text_20_body"><text:span text:style-name="Strong_20_Emphasis">Simulator action:</text:span> Remove all active cooling from your FHR</text:p>
          <text:p text:style-name="Text_20_body"><text:span text:style-name="Strong_20_Emphasis">Show:</text:span></text:p>
          <text:list text:style-name="L11">
            <text:list-item>
              <text:p text:style-name="P22">Reactor automatically shuts down (control rods insert, or negative temperature coefficient) </text:p>
            </text:list-item>
            <text:list-item>
              <text:p text:style-name="P22">Decay heat removal via natural circulation </text:p>
            </text:list-item>
            <text:list-item>
              <text:p text:style-name="P22">Temperature stabilizes below damage thresholds </text:p>
            </text:list-item>
            <text:list-item>
              <text:p text:style-name="P23"><text:span text:style-name="Strong_20_Emphasis">Highlight:</text:span> "No pumps running. No power needed. Indefinitely safe." </text:p>
            </text:list-item>
          </text:list>
          <text:p text:style-name="Text_20_body"><text:span text:style-name="Strong_20_Emphasis">Side-by-side comparison (verbal or visual):</text:span>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header-rows>
              <table:table-row>
                <table:table-cell table:style-name="Table2.A1" office:value-type="string">
                  <text:p text:style-name="Table_20_Heading">Event Timeline</text:p>
                </table:table-cell>
                <table:table-cell table:style-name="Table2.A1" office:value-type="string">
                  <text:p text:style-name="Table_20_Heading">Fukushima (Gen II)</text:p>
                </table:table-cell>
                <table:table-cell table:style-name="Table2.A1" office:value-type="string">
                  <text:p text:style-name="Table_20_Heading">AP1000 (Gen III+)</text:p>
                </table:table-cell>
                <table:table-cell table:style-name="Table2.A1" office:value-type="string">
                  <text:p text:style-name="Table_20_Heading">FHR SMR (Simulator)</text:p>
                </table:table-cell>
              </table:table-row>
            </table:table-header-rows>
            <table:table-row>
              <table:table-cell table:style-name="Table2.A1" office:value-type="string">
                <text:p text:style-name="Table_20_Contents">T+0: Power lost</text:p>
              </table:table-cell>
              <table:table-cell table:style-name="Table2.A1" office:value-type="string">
                <text:p text:style-name="Table_20_Contents">Active cooling stops</text:p>
              </table:table-cell>
              <table:table-cell table:style-name="Table2.A1" office:value-type="string">
                <text:p text:style-name="Table_20_Contents">Passive systems activate</text:p>
              </table:table-cell>
              <table:table-cell table:style-name="Table2.A1" office:value-type="string">
                <text:p text:style-name="Table_20_Contents">Natural circulation continues</text:p>
              </table:table-cell>
            </table:table-row>
            <table:table-row>
              <table:table-cell table:style-name="Table2.A1" office:value-type="string">
                <text:p text:style-name="Table_20_Contents">T+8 hours</text:p>
              </table:table-cell>
              <table:table-cell table:style-name="Table2.A1" office:value-type="string">
                <text:p text:style-name="Table_20_Contents">Batteries die, crisis begins</text:p>
              </table:table-cell>
              <table:table-cell table:style-name="Table2.A1" office:value-type="string">
                <text:p text:style-name="Table_20_Contents">Still safe, no action needed</text:p>
              </table:table-cell>
              <table:table-cell table:style-name="Table2.A1" office:value-type="string">
                <text:p text:style-name="Table_20_Contents">Still safe, no action needed</text:p>
              </table:table-cell>
            </table:table-row>
            <table:table-row>
              <table:table-cell table:style-name="Table2.A1" office:value-type="string">
                <text:p text:style-name="Table_20_Contents">T+72 hours</text:p>
              </table:table-cell>
              <table:table-cell table:style-name="Table2.A1" office:value-type="string">
                <text:p text:style-name="Table_20_Contents">Core damage occurred</text:p>
              </table:table-cell>
              <table:table-cell table:style-name="Table2.A1" office:value-type="string">
                <text:p text:style-name="Table_20_Contents">Still safe, can add water manually</text:p>
              </table:table-cell>
              <table:table-cell table:style-name="Table2.A1" office:value-type="string">
                <text:p text:style-name="Table_20_Contents">Still safe, indefinitely</text:p>
              </table:table-cell>
            </table:table-row>
          </table:table>
          <text:p text:style-name="Text_20_body"><text:span text:style-name="Strong_20_Emphasis">Key message:</text:span> "Unlike Fukushima, modern designs don't need diesel generators or batteries. The AP1000 proved this in simulations. Our SMR demonstrates the same principle."</text:p>
          <text:p text:style-name="Text_20_body"><text:span text:style-name="Strong_20_Emphasis">Scenario 3: Loss of Heat Sink</text:span></text:p>
          <text:p text:style-name="Text_20_body"><text:span text:style-name="Strong_20_Emphasis">Context setting:</text:span></text:p>
          <text:list text:style-name="L12">
            <text:list-item>
              <text:p text:style-name="P24">"What if we can't reject heat to the environment at all?" </text:p>
            </text:list-item>
            <text:list-item>
              <text:p text:style-name="P25">"Ultimate heat sink failure - extremely unlikely but let's test it" </text:p>
            </text:list-item>
          </text:list>
          <text:p text:style-name="Text_20_body"><text:span text:style-name="Strong_20_Emphasis">AP1000 approach:</text:span></text:p>
          <text:list text:style-name="L13">
            <text:list-item>
              <text:p text:style-name="P26">"Passive Containment Cooling uses the atmosphere as infinite heat sink" </text:p>
            </text:list-item>
            <text:list-item>
              <text:p text:style-name="P26">"Water evaporates from containment exterior, cools by evaporation" </text:p>
            </text:list-item>
            <text:list-item>
              <text:p text:style-name="P27"><text:soft-page-break/>"Air circulation continues even without power" </text:p>
            </text:list-item>
          </text:list>
          <text:p text:style-name="Text_20_body"><text:span text:style-name="Strong_20_Emphasis">Simulator action:</text:span> Remove secondary cooling from your FHR</text:p>
          <text:p text:style-name="Text_20_body"><text:span text:style-name="Strong_20_Emphasis">Show:</text:span></text:p>
          <text:list text:style-name="L14">
            <text:list-item>
              <text:p text:style-name="P28">Primary system temperature rises but remains controlled </text:p>
            </text:list-item>
            <text:list-item>
              <text:p text:style-name="P28">Passive heat rejection mechanisms engage </text:p>
            </text:list-item>
            <text:list-item>
              <text:p text:style-name="P28">System reaches equilibrium safely </text:p>
            </text:list-item>
            <text:list-item>
              <text:p text:style-name="P29">Safety margins displayed (how far from limits) </text:p>
            </text:list-item>
          </text:list>
          <text:p text:style-name="Text_20_body"><text:span text:style-name="Strong_20_Emphasis">Key message:</text:span> "Multiple independent heat removal paths. Even if one fails, others work."</text:p>
          <text:p text:style-name="Text_20_body"><text:span text:style-name="Strong_20_Emphasis">Scenario 4: Multiple Simultaneous Failures (Beyond Design Basis)</text:span></text:p>
          <text:p text:style-name="Text_20_body"><text:span text:style-name="Strong_20_Emphasis">Context setting:</text:span></text:p>
          <text:list text:style-name="L15">
            <text:list-item>
              <text:p text:style-name="P30">"Fukushima was a beyond-design-basis event - earthquake + tsunami" </text:p>
            </text:list-item>
            <text:list-item>
              <text:p text:style-name="P30">"Let's go even further: lose power, lose coolant, lose heat sink simultaneously" </text:p>
            </text:list-item>
            <text:list-item>
              <text:p text:style-name="P31">"This is worse than any historical accident" </text:p>
            </text:list-item>
          </text:list>
          <text:p text:style-name="Text_20_body"><text:span text:style-name="Strong_20_Emphasis">AP1000 design philosophy:</text:span></text:p>
          <text:list text:style-name="L16">
            <text:list-item>
              <text:p text:style-name="P32">"AP1000 designed for 'core damage frequency' of 1 in 10 million reactor-years" </text:p>
            </text:list-item>
            <text:list-item>
              <text:p text:style-name="P32">"Multiple passive barriers work independently" </text:p>
            </text:list-item>
            <text:list-item>
              <text:p text:style-name="P33">"Defense-in-depth: even if one barrier fails, others protect" </text:p>
            </text:list-item>
          </text:list>
          <text:p text:style-name="Text_20_body"><text:span text:style-name="Strong_20_Emphasis">Simulator action:</text:span> Trigger multiple failures simultaneously</text:p>
          <text:p text:style-name="Text_20_body"><text:span text:style-name="Strong_20_Emphasis">Show:</text:span></text:p>
          <text:list text:style-name="L17">
            <text:list-item>
              <text:p text:style-name="P34">Defense-in-depth concept in action </text:p>
            </text:list-item>
            <text:list-item>
              <text:p text:style-name="P34">Multiple safety systems responding </text:p>
            </text:list-item>
            <text:list-item>
              <text:p text:style-name="P34">System still reaches safe state (though closer to limits) </text:p>
            </text:list-item>
            <text:list-item>
              <text:p text:style-name="P34">Time scales involved (hours to days, not seconds) </text:p>
            </text:list-item>
            <text:list-item>
              <text:p text:style-name="P35"><text:span text:style-name="Strong_20_Emphasis">Be honest about margins:</text:span> "We're pushing limits here, but still within safe bounds" </text:p>
            </text:list-item>
          </text:list>
          <text:p text:style-name="Text_20_body"><text:span text:style-name="Strong_20_Emphasis">Key message:</text:span> "Even in scenarios worse than Fukushima, passive safety works. This is the difference between Gen II and modern designs."</text:p>
          <text:p text:style-name="Text_20_body"><text:span text:style-name="Strong_20_Emphasis">Interactive element - "Try to Break It":</text:span></text:p>
          <text:list text:style-name="L18">
            <text:list-item>
              <text:p text:style-name="P36">"What combination of failures would you like to see?" </text:p>
            </text:list-item>
            <text:list-item>
              <text:p text:style-name="P36">Take audience suggestions </text:p>
            </text:list-item>
            <text:list-item>
              <text:p text:style-name="P36">Run scenarios live </text:p>
            </text:list-item>
            <text:list-item>
              <text:p text:style-name="P37">Shows robustness and builds confidence </text:p>
            </text:list-item>
          </text:list>
          <text:p text:style-name="Text_20_body"><text:span text:style-name="Strong_20_Emphasis">For each scenario, consistently show:</text:span></text:p>
          <text:list text:style-name="L19">
            <text:list-item>
              <text:p text:style-name="P38"><text:span text:style-name="Strong_20_Emphasis">Real-time parameter changes:</text:span> Temperature, pressure, flow rates, power level </text:p>
            </text:list-item>
            <text:list-item>
              <text:p text:style-name="P38"><text:span text:style-name="Strong_20_Emphasis">Safety margins:</text:span> How far from damage thresholds (fuel damage, vessel failure, containment breach) </text:p>
            </text:list-item>
            <text:list-item>
              <text:p text:style-name="P38"><text:soft-page-break/><text:span text:style-name="Strong_20_Emphasis">Time scales:</text:span> How fast/slow things happen (reassures people there's time to respond if needed) </text:p>
            </text:list-item>
            <text:list-item>
              <text:p text:style-name="P38"><text:span text:style-name="Strong_20_Emphasis">What DOESN'T happen:</text:span> No explosion, no meltdown, no radiation release </text:p>
            </text:list-item>
            <text:list-item>
              <text:p text:style-name="P39"><text:span text:style-name="Strong_20_Emphasis">Comparison to historical accidents:</text:span> What was different, why modern designs are safer </text:p>
            </text:list-item>
          </text:list>
          <text:h text:style-name="Heading_20_3" text:outline-level="3"><text:span text:style-name="Strong_20_Emphasis">Part 4: AP1000 and SMRs - Complementary Approaches (5-7 minutes)</text:span></text:h>
          <text:p text:style-name="Text_20_body"><text:span text:style-name="Strong_20_Emphasis">Address the "which is better?" question:</text:span></text:p>
          <text:p text:style-name="Text_20_body">"You might ask: should Singapore choose AP1000 or SMRs? Here's how they compare:"</text:p>
          <text:p text:style-name="Text_20_body"><text:span text:style-name="Strong_20_Emphasis">AP1000 Advantages:</text:span></text:p>
          <text:list text:style-name="L20">
            <text:list-item>
              <text:p text:style-name="P40">Proven technology (operating in China since 2018) </text:p>
            </text:list-item>
            <text:list-item>
              <text:p text:style-name="P40">Economies of scale (1000 MWe single unit) </text:p>
            </text:list-item>
            <text:list-item>
              <text:p text:style-name="P40">Extensive licensing and operational data </text:p>
            </text:list-item>
            <text:list-item>
              <text:p text:style-name="P41">Known costs and timelines (though projects have had delays) </text:p>
            </text:list-item>
          </text:list>
          <text:p text:style-name="Text_20_body"><text:span text:style-name="Strong_20_Emphasis">SMR Advantages:</text:span></text:p>
          <text:list text:style-name="L21">
            <text:list-item>
              <text:p text:style-name="P42">Smaller initial capital investment </text:p>
            </text:list-item>
            <text:list-item>
              <text:p text:style-name="P42">Modular construction (factory-built, faster deployment) </text:p>
            </text:list-item>
            <text:list-item>
              <text:p text:style-name="P42">Flexibility (can add modules as demand grows) </text:p>
            </text:list-item>
            <text:list-item>
              <text:p text:style-name="P42">Even simpler passive safety (smaller means easier to cool) </text:p>
            </text:list-item>
            <text:list-item>
              <text:p text:style-name="P43">Better suited for land-constrained locations </text:p>
            </text:list-item>
          </text:list>
          <text:p text:style-name="Text_20_body"><text:span text:style-name="Strong_20_Emphasis">Common ground:</text:span></text:p>
          <text:list text:style-name="L22">
            <text:list-item>
              <text:p text:style-name="P44">Both use passive safety principles </text:p>
            </text:list-item>
            <text:list-item>
              <text:p text:style-name="P44">Both eliminate the Fukushima-style accident scenario </text:p>
            </text:list-item>
            <text:list-item>
              <text:p text:style-name="P44">Both provide low-carbon baseload power </text:p>
            </text:list-item>
            <text:list-item>
              <text:p text:style-name="P45">Both require strong regulatory framework </text:p>
            </text:list-item>
          </text:list>
          <text:p text:style-name="Text_20_body"><text:span text:style-name="Strong_20_Emphasis">Singapore context:</text:span></text:p>
          <text:list text:style-name="L23">
            <text:list-item>
              <text:p text:style-name="P46">"AP1000 studied in pre-feasibility because it's proven technology" </text:p>
            </text:list-item>
            <text:list-item>
              <text:p text:style-name="P46">"SMRs may become viable as designs get licensed (2030s)" </text:p>
            </text:list-item>
            <text:list-item>
              <text:p text:style-name="P46">"Understanding the safety principles helps evaluate any option" </text:p>
            </text:list-item>
            <text:list-item>
              <text:p text:style-name="P47">"This simulator demonstrates the physics that makes both safe" </text:p>
            </text:list-item>
          </text:list>
          <text:p text:style-name="Text_20_body"><text:span text:style-name="Strong_20_Emphasis">Key message:</text:span> "The choice depends on economics, timing, and policy - but the safety story is strong for both."</text:p>
          <text:h text:style-name="Heading_20_3" text:outline-level="3"><text:span text:style-name="Strong_20_Emphasis">Part 5: Interactive Q&amp;A (10-15 minutes)</text:span></text:h>
          <text:p text:style-name="Text_20_body"><text:span text:style-name="Strong_20_Emphasis">Invite audience to suggest scenarios:</text:span></text:p>
          <text:list text:style-name="L24">
            <text:list-item>
              <text:p text:style-name="P48">"What other failure modes concern you?" </text:p>
            </text:list-item>
            <text:list-item>
              <text:p text:style-name="P48">"What if there's sabotage/terrorism?" </text:p>
            </text:list-item>
            <text:list-item>
              <text:p text:style-name="P48">"What about earthquakes or tsunamis affecting Singapore?" </text:p>
            </text:list-item>
            <text:list-item>
              <text:p text:style-name="P49">Run relevant scenarios live </text:p>
            </text:list-item>
          </text:list>
          <text:p text:style-name="Text_20_body"><text:soft-page-break/><text:span text:style-name="Strong_20_Emphasis">Address Singapore-specific concerns:</text:span></text:p>
          <text:p text:style-name="Text_20_body"><text:span text:style-name="Strong_20_Emphasis">"Can we evacuate Singapore if needed?"</text:span></text:p>
          <text:list text:style-name="L25">
            <text:list-item>
              <text:p text:style-name="P50">"The point is you won't need to - that's what passive safety means" </text:p>
            </text:list-item>
            <text:list-item>
              <text:p text:style-name="P50">"AP1000 containment designed to hold for weeks even in severe accidents" </text:p>
            </text:list-item>
            <text:list-item>
              <text:p text:style-name="P51">"SMRs have even smaller source term - less inventory to release" </text:p>
            </text:list-item>
          </text:list>
          <text:p text:style-name="Text_20_body"><text:span text:style-name="Strong_20_Emphasis">"What about our neighbors - Malaysia, Indonesia?"</text:span></text:p>
          <text:list text:style-name="L26">
            <text:list-item>
              <text:p text:style-name="P52">"Modern designs have such small accident consequences, evacuation zones are minimal" </text:p>
            </text:list-item>
            <text:list-item>
              <text:p text:style-name="P53">"Compare to existing chemical plants, LNG terminals - risk is comparable or lower" </text:p>
            </text:list-item>
          </text:list>
          <text:p text:style-name="Text_20_body"><text:span text:style-name="Strong_20_Emphasis">"Why not just use solar/wind?"</text:span></text:p>
          <text:list text:style-name="L27">
            <text:list-item>
              <text:p text:style-name="P54">"Nuclear provides baseload - works when sun doesn't shine, wind doesn't blow" </text:p>
            </text:list-item>
            <text:list-item>
              <text:p text:style-name="P54">"Complement each other for reliable carbon-free grid" </text:p>
            </text:list-item>
            <text:list-item>
              <text:p text:style-name="P55">"Singapore's limited land makes high-density power sources attractive" </text:p>
            </text:list-item>
          </text:list>
          <text:p text:style-name="Text_20_body"><text:span text:style-name="Strong_20_Emphasis">"What about nuclear waste?"</text:span></text:p>
          <text:list text:style-name="L28">
            <text:list-item>
              <text:p text:style-name="P56">"Separate issue from safety - though relevant for overall decision" </text:p>
            </text:list-item>
            <text:list-item>
              <text:p text:style-name="P56">"Modern reactors produce less waste, can potentially recycle fuel" </text:p>
            </text:list-item>
            <text:list-item>
              <text:p text:style-name="P57">"This simulator focuses on operational safety, not waste management" </text:p>
            </text:list-item>
          </text:list>
          <text:p text:style-name="Text_20_body"><text:span text:style-name="Strong_20_Emphasis">"How do we know the simulator is accurate?"</text:span></text:p>
          <text:list text:style-name="L29">
            <text:list-item>
              <text:p text:style-name="P58">Be honest: "This is educational, not a licensing tool" </text:p>
            </text:list-item>
            <text:list-item>
              <text:p text:style-name="P58">"Based on validated physics models and international standards" </text:p>
            </text:list-item>
            <text:list-item>
              <text:p text:style-name="P58">"Conservative assumptions built in" </text:p>
            </text:list-item>
            <text:list-item>
              <text:p text:style-name="P59">"Real licensing uses codes like RELAP5, TRACE - we demonstrate principles" </text:p>
            </text:list-item>
          </text:list>
          <text:h text:style-name="Heading_20_2" text:outline-level="2"><text:span text:style-name="Strong_20_Emphasis">How to Use Your Simulator Effectively</text:span></text:h>
          <text:h text:style-name="Heading_20_3" text:outline-level="3"><text:span text:style-name="Strong_20_Emphasis">Before the Presentation:</text:span></text:h>
          <text:list text:style-name="L30">
            <text:list-item>
              <text:p text:style-name="P60"><text:span text:style-name="Strong_20_Emphasis">Create saved scenarios</text:span> - Pre-configure accident cases so you can trigger them instantly</text:p>
              <text:list>
                <text:list-item>
                  <text:p text:style-name="P61">"LOCA_demo.scenario" </text:p>
                </text:list-item>
                <text:list-item>
                  <text:p text:style-name="P61">"Station_Blackout.scenario" </text:p>
                </text:list-item>
                <text:list-item>
                  <text:p text:style-name="P61">"Loss_Heat_Sink.scenario" </text:p>
                </text:list-item>
                <text:list-item>
                  <text:p text:style-name="P61">"Combined_Failures.scenario" </text:p>
                </text:list-item>
              </text:list>
            </text:list-item>
            <text:list-item>
              <text:p text:style-name="P60"><text:span text:style-name="Strong_20_Emphasis">Prepare AP1000 comparison slides</text:span> - Since you can't simulate AP1000 directly:</text:p>
              <text:list>
                <text:list-item>
                  <text:p text:style-name="P61">Diagrams showing AP1000 passive systems </text:p>
                </text:list-item>
                <text:list-item>
                  <text:p text:style-name="P61">Side-by-side comparison of your FHR and AP1000 response </text:p>
                </text:list-item>
                <text:list-item>
                  <text:p text:style-name="P61">Video clips of AP1000 passive cooling demonstrations (if available) </text:p>
                </text:list-item>
              </text:list>
            </text:list-item>
            <text:list-item>
              <text:p text:style-name="P60"><text:span text:style-name="Strong_20_Emphasis">Annotate your GUI</text:span> - Add labels for non-technical audiences:</text:p>
              <text:list>
                <text:list-item>
                  <text:p text:style-name="P61">"Primary Loop Temperature" </text:p>
                </text:list-item>
                <text:list-item>
                  <text:p text:style-name="P61"><text:soft-page-break/>"Decay Heat" </text:p>
                </text:list-item>
                <text:list-item>
                  <text:p text:style-name="P61">"Natural Circulation Flow" </text:p>
                </text:list-item>
                <text:list-item>
                  <text:p text:style-name="P61">"Safety Margin: XX%" </text:p>
                </text:list-item>
              </text:list>
            </text:list-item>
            <text:list-item>
              <text:p text:style-name="P60"><text:span text:style-name="Strong_20_Emphasis">Script your narration</text:span> - Know exactly what to say at each moment:</text:p>
              <text:list>
                <text:list-item>
                  <text:p text:style-name="P61">"Notice temperature rising here..." </text:p>
                </text:list-item>
                <text:list-item>
                  <text:p text:style-name="P61">"Now watch as natural circulation kicks in..." </text:p>
                </text:list-item>
                <text:list-item>
                  <text:p text:style-name="P61">"This is equivalent to AP1000's gravity-fed water tanks activating..." </text:p>
                </text:list-item>
              </text:list>
            </text:list-item>
            <text:list-item>
              <text:p text:style-name="P60"><text:span text:style-name="Strong_20_Emphasis">Test timing</text:span> - Know how long each scenario takes:</text:p>
              <text:list>
                <text:list-item>
                  <text:p text:style-name="P61">Can you speed up simulation for presentation? </text:p>
                </text:list-item>
                <text:list-item>
                  <text:p text:style-name="P61">Where are good pause points? </text:p>
                </text:list-item>
                <text:list-item>
                  <text:p text:style-name="P61">What's the dramatic arc of each scenario? </text:p>
                </text:list-item>
              </text:list>
            </text:list-item>
            <text:list-item>
              <text:p text:style-name="P60"><text:span text:style-name="Strong_20_Emphasis">Prepare fallback videos</text:span> - In case live demo fails:</text:p>
              <text:list>
                <text:list-item>
                  <text:p text:style-name="P61">Record each scenario in advance </text:p>
                </text:list-item>
                <text:list-item>
                  <text:p text:style-name="P61">Have videos ready to play seamlessly </text:p>
                </text:list-item>
              </text:list>
            </text:list-item>
            <text:list-item>
              <text:p text:style-name="P60"><text:span text:style-name="Strong_20_Emphasis">Create comparison materials:</text:span></text:p>
              <text:list>
                <text:list-item>
                  <text:p text:style-name="P61">Table showing "What AP1000 does" vs "What FHR does" for each scenario </text:p>
                </text:list-item>
                <text:list-item>
                  <text:p text:style-name="P60">Emphasize common principles despite different mechanisms </text:p>
                </text:list-item>
              </text:list>
            </text:list-item>
          </text:list>
          <text:h text:style-name="Heading_20_3" text:outline-level="3"><text:span text:style-name="Strong_20_Emphasis">During the Presentation:</text:span></text:h>
          <text:list text:style-name="L31">
            <text:list-item>
              <text:p text:style-name="P62"><text:span text:style-name="Strong_20_Emphasis">Make the AP1000 connection explicit:</text:span></text:p>
              <text:list>
                <text:list-item>
                  <text:p text:style-name="P63">"What I'm showing you in this FHR simulator applies to AP1000 too" </text:p>
                </text:list-item>
                <text:list-item>
                  <text:p text:style-name="P63">"AP1000 uses water and gravity, we use salt and natural circulation - same physics" </text:p>
                </text:list-item>
                <text:list-item>
                  <text:p text:style-name="P63">"Singapore studied AP1000 - these are the safety principles they evaluated" </text:p>
                </text:list-item>
              </text:list>
            </text:list-item>
            <text:list-item>
              <text:p text:style-name="P62"><text:span text:style-name="Strong_20_Emphasis">Use dual visualization:</text:span></text:p>
              <text:list>
                <text:list-item>
                  <text:p text:style-name="P63">Your simulator on main screen </text:p>
                </text:list-item>
                <text:list-item>
                  <text:p text:style-name="P63">AP1000 diagram on side screen or slide </text:p>
                </text:list-item>
                <text:list-item>
                  <text:p text:style-name="P63">Point to both: "Here's where AP1000 does X, here's where our simulator shows Y" </text:p>
                </text:list-item>
              </text:list>
            </text:list-item>
            <text:list-item>
              <text:p text:style-name="P62"><text:span text:style-name="Strong_20_Emphasis">Zoom in on key parameters:</text:span></text:p>
              <text:list>
                <text:list-item>
                  <text:p text:style-name="P63">Temperature trends over time </text:p>
                </text:list-item>
                <text:list-item>
                  <text:p text:style-name="P63">Flow rates showing natural circulation </text:p>
                </text:list-item>
                <text:list-item>
                  <text:p text:style-name="P63">Safety margin indicators </text:p>
                </text:list-item>
              </text:list>
            </text:list-item>
            <text:list-item>
              <text:p text:style-name="P62"><text:span text:style-name="Strong_20_Emphasis">Use color coding:</text:span></text:p>
              <text:list>
                <text:list-item>
                  <text:p text:style-name="P63">Green = normal operation </text:p>
                </text:list-item>
                <text:list-item>
                  <text:p text:style-name="P63">Yellow = transient, but controlled </text:p>
                </text:list-item>
                <text:list-item>
                  <text:p text:style-name="P63">Red = action needed (but still safe) </text:p>
                </text:list-item>
                <text:list-item>
                  <text:p text:style-name="P63">Never reaches "black" = danger </text:p>
                </text:list-item>
              </text:list>
            </text:list-item>
            <text:list-item>
              <text:p text:style-name="P62"><text:span text:style-name="Strong_20_Emphasis">Show trends/graphs:</text:span></text:p>
              <text:list>
                <text:list-item>
                  <text:p text:style-name="P63">Temperature over time (not just instantaneous) </text:p>
                </text:list-item>
                <text:list-item>
                  <text:p text:style-name="P63"><text:soft-page-break/>Compare to damage thresholds </text:p>
                </text:list-item>
                <text:list-item>
                  <text:p text:style-name="P63">Show approach to safe equilibrium </text:p>
                </text:list-item>
              </text:list>
            </text:list-item>
            <text:list-item>
              <text:p text:style-name="P62"><text:span text:style-name="Strong_20_Emphasis">Be transparent about differences:</text:span></text:p>
              <text:list>
                <text:list-item>
                  <text:p text:style-name="P63">"This is a fluoride salt reactor, AP1000 uses water" </text:p>
                </text:list-item>
                <text:list-item>
                  <text:p text:style-name="P63">"Different coolants, same passive safety principles" </text:p>
                </text:list-item>
                <text:list-item>
                  <text:p text:style-name="P62">"Both rely on physics, not pumps" </text:p>
                </text:list-item>
              </text:list>
            </text:list-item>
          </text:list>
          <text:h text:style-name="Heading_20_3" text:outline-level="3"><text:span text:style-name="Strong_20_Emphasis">Presentation Techniques:</text:span></text:h>
          <text:p text:style-name="Text_20_body"><text:span text:style-name="Strong_20_Emphasis">"Predict-then-reveal" method:</text:span></text:p>
          <text:list text:style-name="L32">
            <text:list-item>
              <text:p text:style-name="P64">"Before we start, who thinks this will melt down?" (show of hands) </text:p>
            </text:list-item>
            <text:list-item>
              <text:p text:style-name="P64">"Who thinks it will explode?" </text:p>
            </text:list-item>
            <text:list-item>
              <text:p text:style-name="P64">"Who thinks it will safely shut down?" </text:p>
            </text:list-item>
            <text:list-item>
              <text:p text:style-name="P64">Run simulation </text:p>
            </text:list-item>
            <text:list-item>
              <text:p text:style-name="P65">"Notice it safely shut down - physics wins" </text:p>
            </text:list-item>
          </text:list>
          <text:p text:style-name="Text_20_body"><text:span text:style-name="Strong_20_Emphasis">"Historical comparison" technique:</text:span></text:p>
          <text:list text:style-name="L33">
            <text:list-item>
              <text:p text:style-name="P66"><text:span text:style-name="Strong_20_Emphasis">Before triggering accident:</text:span> Show what happened historically (Fukushima/TMI) </text:p>
            </text:list-item>
            <text:list-item>
              <text:p text:style-name="P66"><text:span text:style-name="Strong_20_Emphasis">During simulation:</text:span> Narrate how your simulator response differs </text:p>
            </text:list-item>
            <text:list-item>
              <text:p text:style-name="P67"><text:span text:style-name="Strong_20_Emphasis">After:</text:span> "This is why AP1000 and modern SMRs are fundamentally safer" </text:p>
            </text:list-item>
          </text:list>
          <text:p text:style-name="Text_20_body"><text:span text:style-name="Strong_20_Emphasis">Example script for Station Blackout:</text:span></text:p>
          <text:p text:style-name="Preformatted_20_Text"><text:span text:style-name="Source_20_Text">"March 11, 2011. Fukushima. Earthquake hits, grid goes down. </text:span></text:p>
          <text:p text:style-name="Preformatted_20_Text"><text:span text:style-name="Source_20_Text">Diesel generators start - good. Tsunami hits, diesels flood - bad.</text:span></text:p>
          <text:p text:style-name="Preformatted_20_Text"><text:span text:style-name="Source_20_Text">Batteries run for 8 hours, then die. Now there's no cooling.</text:span></text:p>
          <text:p text:style-name="Preformatted_20_Text"><text:span text:style-name="Source_20_Text">Operators desperate to restore power. Too late. Core damage begins.</text:span></text:p>
          <text:p text:style-name="Preformatted_20_Text"/>
          <text:p text:style-name="Preformatted_20_Text"><text:span text:style-name="Source_20_Text">Now watch what happens in a modern design when I cut all power...</text:span></text:p>
          <text:p text:style-name="Preformatted_20_Text"><text:span text:style-name="Source_20_Text">[trigger blackout in simulator]</text:span></text:p>
          <text:p text:style-name="Preformatted_20_Text"/>
          <text:p text:style-name="Preformatted_20_Text"><text:span text:style-name="Source_20_Text">Notice: reactor automatically shuts down. Temperature rising from decay heat - that's expected.</text:span></text:p>
          <text:p text:style-name="Preformatted_20_Text"><text:span text:style-name="Source_20_Text">But look: natural circulation starts. No pumps needed.</text:span></text:p>
          <text:p text:style-name="Preformatted_20_Text"><text:span text:style-name="Source_20_Text">Heat is being removed by convection and conduction.</text:span></text:p>
          <text:p text:style-name="Preformatted_20_Text"><text:span text:style-name="Source_20_Text">Temperature stabilizing well below damage threshold.</text:span></text:p>
          <text:p text:style-name="Preformatted_20_Text"/>
          <text:p text:style-name="Preformatted_20_Text"><text:span text:style-name="Source_20_Text">This is hour 8 - when Fukushima's batteries died and crisis began.</text:span></text:p>
          <text:p text:style-name="Preformatted_20_Text"><text:span text:style-name="Source_20_Text">Our reactor? Still safe. No operator action. No power.</text:span></text:p>
          <text:p text:style-name="Preformatted_20_Text"/>
          <text:p text:style-name="Preformatted_20_Text"><text:span text:style-name="Source_20_Text">This is hour 72 - when AP1000's passive systems are still working.</text:span></text:p>
          <text:p text:style-name="Preformatted_20_Text"><text:span text:style-name="Source_20_Text">Our SMR? Still safe. Indefinitely.</text:span></text:p>
          <text:p text:style-name="Preformatted_20_Text"/>
          <text:p text:style-name="P68"><text:span text:style-name="Source_20_Text">This is the difference between Gen II and modern reactors."</text:span></text:p>
          <text:p text:style-name="Text_20_body"><text:span text:style-name="Strong_20_Emphasis">"Try to break it" dramatic approach:</text:span></text:p>
          <text:list text:style-name="L34">
            <text:list-item>
              <text:p text:style-name="P69">"I'm going to try my hardest to cause a disaster. Watch me fail." </text:p>
            </text:list-item>
            <text:list-item>
              <text:p text:style-name="P69">Dramatically click through multiple failure triggers </text:p>
            </text:list-item>
            <text:list-item>
              <text:p text:style-name="P69">Build tension, then show safe resolution </text:p>
            </text:list-item>
            <text:list-item>
              <text:p text:style-name="P70"><text:soft-page-break/>Reinforces that safety is robust, not fragile </text:p>
            </text:list-item>
          </text:list>
          <text:p text:style-name="Text_20_body"><text:span text:style-name="Strong_20_Emphasis">AP1000 storytelling anchor:</text:span></text:p>
          <text:list text:style-name="L35">
            <text:list-item>
              <text:p text:style-name="P71">"When China was building the first AP1000s, there was skepticism" </text:p>
            </text:list-item>
            <text:list-item>
              <text:p text:style-name="P71">"They did extensive testing - passive cooling works exactly as designed" </text:p>
            </text:list-item>
            <text:list-item>
              <text:p text:style-name="P71">"Operating since 2018, multiple units, excellent safety record" </text:p>
            </text:list-item>
            <text:list-item>
              <text:p text:style-name="P72">"What you're seeing in this simulator are the same physics principles" </text:p>
            </text:list-item>
          </text:list>
          <text:h text:style-name="Heading_20_3" text:outline-level="3"><text:span text:style-name="Strong_20_Emphasis">Supporting Materials</text:span></text:h>
          <text:h text:style-name="Heading_20_3" text:outline-level="3"><text:span text:style-name="Strong_20_Emphasis">Handouts/Slides:</text:span></text:h>
          <text:p text:style-name="Text_20_body"><text:span text:style-name="Strong_20_Emphasis">Must-have slides:</text:span></text:p>
          <text:list text:style-name="L36">
            <text:list-item>
              <text:p text:style-name="P73"><text:span text:style-name="Strong_20_Emphasis">Title slide:</text:span> "Understanding Nuclear Safety: From AP1000 to SMRs"</text:p>
            </text:list-item>
            <text:list-item>
              <text:p text:style-name="P73"><text:span text:style-name="Strong_20_Emphasis">"What went wrong historically?"</text:span></text:p>
              <text:list>
                <text:list-item>
                  <text:p text:style-name="P74">Chernobyl: No containment, positive feedback, operators overrode safety </text:p>
                </text:list-item>
                <text:list-item>
                  <text:p text:style-name="P74">TMI: Partial meltdown, but containment worked, no public harm </text:p>
                </text:list-item>
                <text:list-item>
                  <text:p text:style-name="P74">Fukushima: Loss of power → loss of cooling → core damage </text:p>
                </text:list-item>
                <text:list-item>
                  <text:p text:style-name="P74"><text:span text:style-name="Strong_20_Emphasis">Key point:</text:span> All Gen II designs requiring active safety </text:p>
                </text:list-item>
              </text:list>
            </text:list-item>
            <text:list-item>
              <text:p text:style-name="P73"><text:span text:style-name="Strong_20_Emphasis">"The Passive Safety Revolution"</text:span></text:p>
              <text:list>
                <text:list-item>
                  <text:p text:style-name="P74">Gen III/III+: AP1000, EPR, APR1400 </text:p>
                </text:list-item>
                <text:list-item>
                  <text:p text:style-name="P74">SMRs: NuScale, BWRX-300, moltex, your FHR </text:p>
                </text:list-item>
                <text:list-item>
                  <text:p text:style-name="P74">Common principle: Physics, not pumps </text:p>
                </text:list-item>
              </text:list>
            </text:list-item>
            <text:list-item>
              <text:p text:style-name="P73"><text:span text:style-name="Strong_20_Emphasis">"AP1000 Passive Safety Systems"</text:span> (diagram):</text:p>
              <text:list>
                <text:list-item>
                  <text:p text:style-name="P74">Passive Core Cooling System (PXS) </text:p>
                </text:list-item>
                <text:list-item>
                  <text:p text:style-name="P74">Passive Containment Cooling System (PCS) </text:p>
                </text:list-item>
                <text:list-item>
                  <text:p text:style-name="P74">Automatic Depressurization System (ADS) </text:p>
                </text:list-item>
                <text:list-item>
                  <text:p text:style-name="P74">Gravity-driven water delivery </text:p>
                </text:list-item>
              </text:list>
            </text:list-item>
            <text:list-item>
              <text:p text:style-name="P73"><text:span text:style-name="Strong_20_Emphasis">"How SMRs Achieve Similar Safety"</text:span> (comparison):</text:p>
              <text:list>
                <text:list-item>
                  <text:p text:style-name="P74">Smaller core = easier to cool </text:p>
                </text:list-item>
                <text:list-item>
                  <text:p text:style-name="P74">Natural circulation more effective </text:p>
                </text:list-item>
                <text:list-item>
                  <text:p text:style-name="P74">Lower power density </text:p>
                </text:list-item>
                <text:list-item>
                  <text:p text:style-name="P74">Underground/pool siting options </text:p>
                </text:list-item>
              </text:list>
            </text:list-item>
            <text:list-item>
              <text:p text:style-name="P73"><text:span text:style-name="Strong_20_Emphasis">"Singapore Context"</text:span></text:p>
              <text:list>
                <text:list-item>
                  <text:p text:style-name="P74">Pre-feasibility study examined AP1000 </text:p>
                </text:list-item>
                <text:list-item>
                  <text:p text:style-name="P74">Considering SMRs as technology matures </text:p>
                </text:list-item>
                <text:list-item>
                  <text:p text:style-name="P74">Energy security and carbon goals </text:p>
                </text:list-item>
                <text:list-item>
                  <text:p text:style-name="P74">Safety requirements for dense population </text:p>
                </text:list-item>
              </text:list>
            </text:list-item>
            <text:list-item>
              <text:p text:style-name="P73"><text:span text:style-name="Strong_20_Emphasis">"Simulator Interface Guide"</text:span></text:p>
              <text:list>
                <text:list-item>
                  <text:p text:style-name="P74">Screenshot with annotations </text:p>
                </text:list-item>
                <text:list-item>
                  <text:p text:style-name="P74"><text:soft-page-break/>What each parameter means </text:p>
                </text:list-item>
                <text:list-item>
                  <text:p text:style-name="P74">How to trigger scenarios </text:p>
                </text:list-item>
              </text:list>
            </text:list-item>
            <text:list-item>
              <text:p text:style-name="P73"><text:span text:style-name="Strong_20_Emphasis">"Try It Yourself"</text:span></text:p>
              <text:list>
                <text:list-item>
                  <text:p text:style-name="P74">Download link/QR code </text:p>
                </text:list-item>
                <text:list-item>
                  <text:p text:style-name="P74">Tutorial resources </text:p>
                </text:list-item>
                <text:list-item>
                  <text:p text:style-name="P73">Community forum </text:p>
                </text:list-item>
              </text:list>
            </text:list-item>
          </text:list>
          <text:p text:style-name="Text_20_body"><text:span text:style-name="Strong_20_Emphasis">Infographics:</text:span></text:p>
          <text:list text:style-name="L37">
            <text:list-item>
              <text:p text:style-name="P75"><text:span text:style-name="Strong_20_Emphasis">"Defense in Depth" diagram:</text:span></text:p>
              <text:list>
                <text:list-item>
                  <text:p text:style-name="P76">Multiple barriers preventing radiation release </text:p>
                </text:list-item>
                <text:list-item>
                  <text:p text:style-name="P76">How each barrier works in AP1000 and SMRs </text:p>
                </text:list-item>
              </text:list>
            </text:list-item>
            <text:list-item>
              <text:p text:style-name="P75"><text:span text:style-name="Strong_20_Emphasis">"Accident Timeline Comparison":</text:span></text:p>
              <text:list>
                <text:list-item>
                  <text:p text:style-name="P76">Fukushima Gen II vs AP1000 Gen III+ vs FHR SMR </text:p>
                </text:list-item>
                <text:list-item>
                  <text:p text:style-name="P76">Show divergence at key decision points </text:p>
                </text:list-item>
              </text:list>
            </text:list-item>
            <text:list-item>
              <text:p text:style-name="P75"><text:span text:style-name="Strong_20_Emphasis">"Passive Safety Systems":</text:span></text:p>
              <text:list>
                <text:list-item>
                  <text:p text:style-name="P76">Visual showing gravity, convection, evaporation </text:p>
                </text:list-item>
                <text:list-item>
                  <text:p text:style-name="P76">"No pumps, no power, no problem" </text:p>
                </text:list-item>
              </text:list>
            </text:list-item>
            <text:list-item>
              <text:p text:style-name="P75"><text:span text:style-name="Strong_20_Emphasis">"Singapore Energy Mix 2050":</text:span></text:p>
              <text:list>
                <text:list-item>
                  <text:p text:style-name="P76">Current: 95% natural gas </text:p>
                </text:list-item>
                <text:list-item>
                  <text:p text:style-name="P76">Proposed: Solar + imports + nuclear? </text:p>
                </text:list-item>
                <text:list-item>
                  <text:p text:style-name="P75">How nuclear fits the puzzle </text:p>
                </text:list-item>
              </text:list>
            </text:list-item>
          </text:list>
          <text:p text:style-name="Text_20_body"><text:span text:style-name="Strong_20_Emphasis">Digital materials:</text:span></text:p>
          <text:list text:style-name="L38">
            <text:list-item>
              <text:p text:style-name="P77">QR code to simulator download </text:p>
            </text:list-item>
            <text:list-item>
              <text:p text:style-name="P77">Link to AP1000 safety documentation (Westinghouse, NRC) </text:p>
            </text:list-item>
            <text:list-item>
              <text:p text:style-name="P77">Video library of scenarios </text:p>
            </text:list-item>
            <text:list-item>
              <text:p text:style-name="P78">Comparison tool: "AP1000 vs SMRs" </text:p>
            </text:list-item>
          </text:list>
          <text:h text:style-name="Heading_20_3" text:outline-level="3"><text:span text:style-name="Strong_20_Emphasis">Credibility Builders:</text:span></text:h>
          <text:p text:style-name="Text_20_body"><text:span text:style-name="Strong_20_Emphasis">Technical validation:</text:span></text:p>
          <text:list text:style-name="L39">
            <text:list-item>
              <text:p text:style-name="P79">"Steam tables based on IAPWS international standards" </text:p>
            </text:list-item>
            <text:list-item>
              <text:p text:style-name="P79">"Thermal hydraulics validated against published data" </text:p>
            </text:list-item>
            <text:list-item>
              <text:p text:style-name="P79">"Neutronics models based on established reactor physics" </text:p>
            </text:list-item>
            <text:list-item>
              <text:p text:style-name="P80">"Conservative assumptions throughout" </text:p>
            </text:list-item>
          </text:list>
          <text:p text:style-name="Text_20_body"><text:span text:style-name="Strong_20_Emphasis">AP1000 references:</text:span></text:p>
          <text:list text:style-name="L40">
            <text:list-item>
              <text:p text:style-name="P81">"AP1000 Design Control Document (NRC approved)" </text:p>
            </text:list-item>
            <text:list-item>
              <text:p text:style-name="P81">"Operating experience from Sanmen and Haiyang plants in China" </text:p>
            </text:list-item>
            <text:list-item>
              <text:p text:style-name="P81">"Vogtle Units 3&amp;4 in USA (recently completed)" </text:p>
            </text:list-item>
            <text:list-item>
              <text:p text:style-name="P82">"Singapore's pre-feasibility study findings (cite if public)" </text:p>
            </text:list-item>
          </text:list>
          <text:p text:style-name="Text_20_body"><text:soft-page-break/><text:span text:style-name="Strong_20_Emphasis">Honest limitations:</text:span></text:p>
          <text:list text:style-name="L41">
            <text:list-item>
              <text:p text:style-name="P83">"This simulator is educational, not for licensing" </text:p>
            </text:list-item>
            <text:list-item>
              <text:p text:style-name="P83">"Real licensing requires codes like RELAP5, TRACE, MELCOR" </text:p>
            </text:list-item>
            <text:list-item>
              <text:p text:style-name="P83">"We model key phenomena, not every engineering detail" </text:p>
            </text:list-item>
            <text:list-item>
              <text:p text:style-name="P84">"Purpose: demonstrate physics principles, not predict exact numbers" </text:p>
            </text:list-item>
          </text:list>
          <text:p text:style-name="Text_20_body"><text:span text:style-name="Strong_20_Emphasis">Your expertise:</text:span></text:p>
          <text:list text:style-name="L42">
            <text:list-item>
              <text:p text:style-name="P85">Background in nuclear engineering/thermal hydraulics </text:p>
            </text:list-item>
            <text:list-item>
              <text:p text:style-name="P85">Academic affiliations (if any) </text:p>
            </text:list-item>
            <text:list-item>
              <text:p text:style-name="P85">Open-source approach (transparency = credibility) </text:p>
            </text:list-item>
            <text:list-item>
              <text:p text:style-name="P86">"TAMPINES" framework (Thermo-hydraulic Artificial intelligence Multi-Phase INtegrated Emulator System) </text:p>
            </text:list-item>
          </text:list>
          <text:h text:style-name="Heading_20_3" text:outline-level="3"><text:span text:style-name="Strong_20_Emphasis">Singapore-Specific Messaging:</text:span></text:h>
          <text:p text:style-name="Text_20_body"><text:span text:style-name="Strong_20_Emphasis">Address local concerns directly:</text:span></text:p>
          <text:p text:style-name="Text_20_body"><text:span text:style-name="Strong_20_Emphasis">Land scarcity:</text:span></text:p>
          <text:list text:style-name="L43">
            <text:list-item>
              <text:p text:style-name="P87">"AP1000: ~0.5 km² footprint for plant" </text:p>
            </text:list-item>
            <text:list-item>
              <text:p text:style-name="P87">"SMRs: Even smaller, some designs underground/offshore" </text:p>
            </text:list-item>
            <text:list-item>
              <text:p text:style-name="P88">"Compare to: Jurong Island petrochemical facilities, Tuas Power plants" </text:p>
            </text:list-item>
          </text:list>
          <text:p text:style-name="Text_20_body"><text:span text:style-name="Strong_20_Emphasis">Population density:</text:span></text:p>
          <text:list text:style-name="L44">
            <text:list-item>
              <text:p text:style-name="P89">"Passive safety means minimal evacuation planning needed" </text:p>
            </text:list-item>
            <text:list-item>
              <text:p text:style-name="P89">"AP1000 containment designed for weeks of protection" </text:p>
            </text:list-item>
            <text:list-item>
              <text:p text:style-name="P90">"Modern designs have smaller source terms than Gen II" </text:p>
            </text:list-item>
          </text:list>
          <text:p text:style-name="Text_20_body"><text:span text:style-name="Strong_20_Emphasis">Water usage:</text:span></text:p>
          <text:list text:style-name="L45">
            <text:list-item>
              <text:p text:style-name="P91">"Coastal location ideal for once-through cooling" </text:p>
            </text:list-item>
            <text:list-item>
              <text:p text:style-name="P91">"AP1000 uses seawater for condenser cooling" </text:p>
            </text:list-item>
            <text:list-item>
              <text:p text:style-name="P92">"Closed-cycle options available if needed" </text:p>
            </text:list-item>
          </text:list>
          <text:p text:style-name="Text_20_body"><text:span text:style-name="Strong_20_Emphasis">Regulatory framework:</text:span></text:p>
          <text:list text:style-name="L46">
            <text:list-item>
              <text:p text:style-name="P93">"Would need to establish nuclear regulatory authority" </text:p>
            </text:list-item>
            <text:list-item>
              <text:p text:style-name="P93">"Can leverage IAEA standards and support" </text:p>
            </text:list-item>
            <text:list-item>
              <text:p text:style-name="P94">"Neighboring countries have experience: South Korea, China" </text:p>
            </text:list-item>
          </text:list>
          <text:p text:style-name="Text_20_body"><text:span text:style-name="Strong_20_Emphasis">Energy security:</text:span></text:p>
          <text:list text:style-name="L47">
            <text:list-item>
              <text:p text:style-name="P95">"Reduces dependence on imported natural gas" </text:p>
            </text:list-item>
            <text:list-item>
              <text:p text:style-name="P95">"Fuel supply more secure (small volumes, long refueling cycles)" </text:p>
            </text:list-item>
            <text:list-item>
              <text:p text:style-name="P96">"Complements solar and imports for resilient grid" </text:p>
            </text:list-item>
          </text:list>
          <text:p text:style-name="Text_20_body"><text:span text:style-name="Strong_20_Emphasis">Regional context:</text:span></text:p>
          <text:list text:style-name="L48">
            <text:list-item>
              <text:p text:style-name="P97">"If Malaysia builds nuclear, understanding the technology matters for Singapore" </text:p>
            </text:list-item>
            <text:list-item>
              <text:p text:style-name="P97"><text:soft-page-break/>"Regional grid interconnection plans - nuclear could be part of it" </text:p>
            </text:list-item>
            <text:list-item>
              <text:p text:style-name="P98">"China, South Korea, UAE operating modern reactors successfully" </text:p>
            </text:list-item>
          </text:list>
          <text:p text:style-name="Text_20_body"><text:span text:style-name="Strong_20_Emphasis">Timeline:</text:span></text:p>
          <text:list text:style-name="L49">
            <text:list-item>
              <text:p text:style-name="P99">"AP1000: 5-7 years construction (if streamlined)" </text:p>
            </text:list-item>
            <text:list-item>
              <text:p text:style-name="P99">"SMRs: Designs being licensed now, commercial in 2030s" </text:p>
            </text:list-item>
            <text:list-item>
              <text:p text:style-name="P100">"Singapore's study: Feasibility by 2030s, potential deployment 2040s" </text:p>
            </text:list-item>
          </text:list>
          <text:h text:style-name="Heading_20_2" text:outline-level="2"><text:span text:style-name="Strong_20_Emphasis">Tailoring for Each Audience</text:span></text:h>
          <text:h text:style-name="Heading_20_3" text:outline-level="3"><text:span text:style-name="Strong_20_Emphasis">Students:</text:span></text:h>
          <text:p text:style-name="Text_20_body"><text:span text:style-name="Strong_20_Emphasis">Emphasize learning and career opportunities:</text:span></text:p>
          <text:list text:style-name="L50">
            <text:list-item>
              <text:p text:style-name="P101">"See thermodynamics, heat transfer, and neutronics in action" </text:p>
            </text:list-item>
            <text:list-item>
              <text:p text:style-name="P101">"This demonstrates concepts from your physics/engineering classes" </text:p>
            </text:list-item>
            <text:list-item>
              <text:p text:style-name="P102">"Nuclear engineers are in high demand globally - Singapore would need them" </text:p>
            </text:list-item>
          </text:list>
          <text:p text:style-name="Text_20_body"><text:span text:style-name="Strong_20_Emphasis">Hands-on engagement:</text:span></text:p>
          <text:list text:style-name="L51">
            <text:list-item>
              <text:p text:style-name="P103">"After this presentation, you can download and experiment" </text:p>
            </text:list-item>
            <text:list-item>
              <text:p text:style-name="P103">"Try your own scenarios - what happens if you change X parameter?" </text:p>
            </text:list-item>
            <text:list-item>
              <text:p text:style-name="P104">"Use for projects, reports, or just curiosity" </text:p>
            </text:list-item>
          </text:list>
          <text:p text:style-name="Text_20_body"><text:span text:style-name="Strong_20_Emphasis">AP1000 connection:</text:span></text:p>
          <text:list text:style-name="L52">
            <text:list-item>
              <text:p text:style-name="P105">"AP1000 is real, operating technology - study it alongside SMR concepts" </text:p>
            </text:list-item>
            <text:list-item>
              <text:p text:style-name="P105">"Understanding both gives you broader perspective" </text:p>
            </text:list-item>
            <text:list-item>
              <text:p text:style-name="P106">"Career paths: design, operations, regulation, research" </text:p>
            </text:list-item>
          </text:list>
          <text:p text:style-name="Text_20_body"><text:span text:style-name="Strong_20_Emphasis">Challenge them:</text:span></text:p>
          <text:list text:style-name="L53">
            <text:list-item>
              <text:p text:style-name="P107">"Can you think of a scenario that defeats passive safety?" </text:p>
            </text:list-item>
            <text:list-item>
              <text:p text:style-name="P107">"What would you improve in these designs?" </text:p>
            </text:list-item>
            <text:list-item>
              <text:p text:style-name="P108">"How would you explain this to your family?" </text:p>
            </text:list-item>
          </text:list>
          <text:h text:style-name="Heading_20_3" text:outline-level="3"><text:span text:style-name="Strong_20_Emphasis">Teachers:</text:span></text:h>
          <text:p text:style-name="Text_20_body"><text:span text:style-name="Strong_20_Emphasis">Curriculum integration:</text:span></text:p>
          <text:list text:style-name="L54">
            <text:list-item>
              <text:p text:style-name="P109">"Demonstrates: thermodynamics, heat transfer, fluid mechanics, nuclear physics" </text:p>
            </text:list-item>
            <text:list-item>
              <text:p text:style-name="P109">"Aligns with: A-level Physics, IB Physics, university engineering courses" </text:p>
            </text:list-item>
            <text:list-item>
              <text:p text:style-name="P110">"Can be 1-hour demo or semester-long project" </text:p>
            </text:list-item>
          </text:list>
          <text:p text:style-name="Text_20_body"><text:span text:style-name="Strong_20_Emphasis">Practical teaching tools:</text:span></text:p>
          <text:list text:style-name="L55">
            <text:list-item>
              <text:p text:style-name="P111">"Lesson plans provided - ready to use" </text:p>
            </text:list-item>
            <text:list-item>
              <text:p text:style-name="P111">"Lab activities: students run scenarios, analyze results" </text:p>
            </text:list-item>
            <text:list-item>
              <text:p text:style-name="P112">"Assessment ideas: compare different accident responses" </text:p>
            </text:list-item>
          </text:list>
          <text:p text:style-name="Text_20_body"><text:soft-page-break/><text:span text:style-name="Strong_20_Emphasis">AP1000 case study:</text:span></text:p>
          <text:list text:style-name="L56">
            <text:list-item>
              <text:p text:style-name="P113">"Real-world example of engineering design principles" </text:p>
            </text:list-item>
            <text:list-item>
              <text:p text:style-name="P113">"Connect theory to practice" </text:p>
            </text:list-item>
            <text:list-item>
              <text:p text:style-name="P114">"Show how safety requirements drive design decisions" </text:p>
            </text:list-item>
          </text:list>
          <text:p text:style-name="Text_20_body"><text:span text:style-name="Strong_20_Emphasis">Training and support:</text:span></text:p>
          <text:list text:style-name="L57">
            <text:list-item>
              <text:p text:style-name="P115">"We'll train you on using the simulator" </text:p>
            </text:list-item>
            <text:list-item>
              <text:p text:style-name="P115">"Join teacher community - share lesson plans" </text:p>
            </text:list-item>
            <text:list-item>
              <text:p text:style-name="P116">"Technical support available" </text:p>
            </text:list-item>
          </text:list>
          <text:p text:style-name="Text_20_body"><text:span text:style-name="Strong_20_Emphasis">Interdisciplinary opportunities:</text:span></text:p>
          <text:list text:style-name="L58">
            <text:list-item>
              <text:p text:style-name="P117">Physics: energy, thermodynamics </text:p>
            </text:list-item>
            <text:list-item>
              <text:p text:style-name="P117">Chemistry: nuclear reactions, coolant properties </text:p>
            </text:list-item>
            <text:list-item>
              <text:p text:style-name="P117">Mathematics: modeling, differential equations </text:p>
            </text:list-item>
            <text:list-item>
              <text:p text:style-name="P118">Social studies: energy policy, risk assessment </text:p>
            </text:list-item>
          </text:list>
          <text:h text:style-name="Heading_20_3" text:outline-level="3"><text:span text:style-name="Strong_20_Emphasis">Hobbyists/Science Communicators:</text:span></text:h>
          <text:p text:style-name="Text_20_body"><text:span text:style-name="Strong_20_Emphasis">Give them the deep dive:</text:span></text:p>
          <text:list text:style-name="L59">
            <text:list-item>
              <text:p text:style-name="P119">"Here's the technical documentation - full physics models" </text:p>
            </text:list-item>
            <text:list-item>
              <text:p text:style-name="P119">"Open source - you can examine and modify the code" </text:p>
            </text:list-item>
            <text:list-item>
              <text:p text:style-name="P120">"Contribute improvements - we'll credit you" </text:p>
            </text:list-item>
          </text:list>
          <text:p text:style-name="Text_20_body"><text:span text:style-name="Strong_20_Emphasis">Content creation opportunities:</text:span></text:p>
          <text:list text:style-name="L60">
            <text:list-item>
              <text:p text:style-name="P121">"Make videos comparing AP1000 to SMRs" </text:p>
            </text:list-item>
            <text:list-item>
              <text:p text:style-name="P121">"Explain passive safety to your audience" </text:p>
            </text:list-item>
            <text:list-item>
              <text:p text:style-name="P121">"Test extreme scenarios and share results" </text:p>
            </text:list-item>
            <text:list-item>
              <text:p text:style-name="P122">"Interview us for your podcast/blog" </text:p>
            </text:list-item>
          </text:list>
          <text:p text:style-name="Text_20_body"><text:span text:style-name="Strong_20_Emphasis">Early access:</text:span></text:p>
          <text:list text:style-name="L61">
            <text:list-item>
              <text:p text:style-name="P123">"You're seeing features before public release" </text:p>
            </text:list-item>
            <text:list-item>
              <text:p text:style-name="P123">"Your feedback shapes development" </text:p>
            </text:list-item>
            <text:list-item>
              <text:p text:style-name="P124">"Help us reach broader audiences" </text:p>
            </text:list-item>
          </text:list>
          <text:p text:style-name="Text_20_body"><text:span text:style-name="Strong_20_Emphasis">Community building:</text:span></text:p>
          <text:list text:style-name="L62">
            <text:list-item>
              <text:p text:style-name="P125">"Join our Discord/forum" </text:p>
            </text:list-item>
            <text:list-item>
              <text:p text:style-name="P125">"Share your scenarios - we'll feature the best ones" </text:p>
            </text:list-item>
            <text:list-item>
              <text:p text:style-name="P125">"Collaborate on new features" </text:p>
            </text:list-item>
            <text:list-item>
              <text:p text:style-name="P126">"Connect with other nuclear enthusiasts" </text:p>
            </text:list-item>
          </text:list>
          <text:p text:style-name="Text_20_body"><text:span text:style-name="Strong_20_Emphasis">AP1000 deep dive:</text:span></text:p>
          <text:list text:style-name="L63">
            <text:list-item>
              <text:p text:style-name="P127">"Here are the technical specifications" </text:p>
            </text:list-item>
            <text:list-item>
              <text:p text:style-name="P127">"Compare our simulator results to AP1000 safety analyses" </text:p>
            </text:list-item>
            <text:list-item>
              <text:p text:style-name="P128"><text:soft-page-break/>"Help us add AP1000-specific scenarios" </text:p>
            </text:list-item>
          </text:list>
          <text:p text:style-name="Text_20_body"><text:span text:style-name="Strong_20_Emphasis">Credibility boost:</text:span></text:p>
          <text:list text:style-name="L64">
            <text:list-item>
              <text:p text:style-name="P129">"Your audience trusts you - help them understand nuclear safety" </text:p>
            </text:list-item>
            <text:list-item>
              <text:p text:style-name="P129">"Combat misinformation with interactive demonstrations" </text:p>
            </text:list-item>
            <text:list-item>
              <text:p text:style-name="P130">"Show, don't just tell" </text:p>
            </text:list-item>
          </text:list>
          <text:h text:style-name="Heading_20_2" text:outline-level="2"><text:span text:style-name="Strong_20_Emphasis">Call to Action</text:span></text:h>
          <text:p text:style-name="Text_20_body"><text:span text:style-name="Strong_20_Emphasis">End with clear, actionable next steps:</text:span></text:p>
          <text:h text:style-name="Heading_20_3" text:outline-level="3"><text:span text:style-name="Strong_20_Emphasis">For Everyone:</text:span></text:h>
          <text:list text:style-name="L65">
            <text:list-item>
              <text:p text:style-name="P131"><text:span text:style-name="Strong_20_Emphasis">Download and explore:</text:span> "Get the simulator at [website] - Windows/Mac/Linux" </text:p>
            </text:list-item>
            <text:list-item>
              <text:p text:style-name="P131"><text:span text:style-name="Strong_20_Emphasis">Watch tutorials:</text:span> "5-minute quick start, detailed scenario guides" </text:p>
            </text:list-item>
            <text:list-item>
              <text:p text:style-name="P132"><text:span text:style-name="Strong_20_Emphasis">Share your experience:</text:span> "What did you learn? What surprised you?" </text:p>
            </text:list-item>
          </text:list>
          <text:h text:style-name="Heading_20_3" text:outline-level="3"><text:span text:style-name="Strong_20_Emphasis">For Students:</text:span></text:h>
          <text:list text:style-name="L66">
            <text:list-item>
              <text:p text:style-name="P133">"Use it for your next project" </text:p>
            </text:list-item>
            <text:list-item>
              <text:p text:style-name="P133">"Show your teachers - suggest it for class" </text:p>
            </text:list-item>
            <text:list-item>
              <text:p text:style-name="P134">"Consider nuclear engineering as a career path" </text:p>
            </text:list-item>
          </text:list>
          <text:h text:style-name="Heading_20_3" text:outline-level="3"><text:span text:style-name="Strong_20_Emphasis">For Teachers:</text:span></text:h>
          <text:list text:style-name="L67">
            <text:list-item>
              <text:p text:style-name="P135">"Request training session for your school" </text:p>
            </text:list-item>
            <text:list-item>
              <text:p text:style-name="P135">"Download lesson plan package" </text:p>
            </text:list-item>
            <text:list-item>
              <text:p text:style-name="P136">"Join educator community" </text:p>
            </text:list-item>
          </text:list>
          <text:h text:style-name="Heading_20_3" text:outline-level="3"><text:span text:style-name="Strong_20_Emphasis">For Hobbyists/Communicators:</text:span></text:h>
          <text:list text:style-name="L68">
            <text:list-item>
              <text:p text:style-name="P137">"Create content - we'll promote it" </text:p>
            </text:list-item>
            <text:list-item>
              <text:p text:style-name="P137">"Join development community" </text:p>
            </text:list-item>
            <text:list-item>
              <text:p text:style-name="P138">"Help us improve and expand" </text:p>
            </text:list-item>
          </text:list>
          <text:h text:style-name="Heading_20_3" text:outline-level="3"><text:span text:style-name="Strong_20_Emphasis">For Everyone Interested in Singapore's Energy Future:</text:span></text:h>
          <text:list text:style-name="L69">
            <text:list-item>
              <text:p text:style-name="P139">"Understand the technology before forming opinions" </text:p>
            </text:list-item>
            <text:list-item>
              <text:p text:style-name="P139">"Engage in informed discussion about nuclear option" </text:p>
            </text:list-item>
            <text:list-item>
              <text:p text:style-name="P140">"Share this tool with others in the conversation" </text:p>
            </text:list-item>
          </text:list>
          <text:p text:style-name="Text_20_body"><text:span text:style-name="Strong_20_Emphasis">Final message:</text:span></text:p>
          <text:p text:style-name="Text_20_body">"Singapore is studying nuclear power as part of our energy future. Whether we choose AP1000, SMRs, or another path, understanding passive safety is crucial.</text:p>
          <text:p text:style-name="Text_20_body">The best way to understand nuclear safety isn't to trust experts blindly - it's to see the physics for yourself. That's why we built this simulator.</text:p>
          <text:p text:style-name="Text_20_body"><text:soft-page-break/>AP1000 is proven technology, operating successfully. SMRs are the next generation. Both rely on the same fundamental principle: physics, not pumps.</text:p>
          <text:p text:style-name="Text_20_body">Now it's your turn to explore. Download the simulator. Run the scenarios. Try to break it - you'll find you can't.</text:p>
          <text:p text:style-name="Text_20_body">Because modern nuclear reactors aren't safe because we're careful - they're safe because physics makes them safe.</text:p>
          <text:p text:style-name="Text_20_body">Thank you. Let's take your questions."</text:p>
          <text:p text:style-name="Horizontal_20_Line"/>
          <text:h text:style-name="Heading_20_2" text:outline-level="2"><text:span text:style-name="Strong_20_Emphasis">Key Additions for AP1000:</text:span></text:h>
          <text:list text:style-name="L70">
            <text:list-item>
              <text:p text:style-name="P141"><text:span text:style-name="Strong_20_Emphasis">Context:</text:span> Singapore's pre-feasibility study makes AP1000 directly relevant </text:p>
            </text:list-item>
            <text:list-item>
              <text:p text:style-name="P141"><text:span text:style-name="Strong_20_Emphasis">Credibility:</text:span> AP1000 is operating technology (China), not just theoretical </text:p>
            </text:list-item>
            <text:list-item>
              <text:p text:style-name="P141"><text:span text:style-name="Strong_20_Emphasis">Comparison framework:</text:span> AP1000 represents "large advanced" while FHR represents "small modular" </text:p>
            </text:list-item>
            <text:list-item>
              <text:p text:style-name="P141"><text:span text:style-name="Strong_20_Emphasis">Common principles:</text:span> Both use passive safety, just different mechanisms </text:p>
            </text:list-item>
            <text:list-item>
              <text:p text:style-name="P142"><text:span text:style-name="Strong_20_Emphasis">Educational value:</text:span> Understanding both gives complete picture of modern nuclear safety </text:p>
            </text:list-item>
          </text:list>
          <text:p text:style-name="Text_20_body"><text:span text:style-name="Strong_20_Emphasis">Would you like me to:</text:span></text:p>
          <text:list text:style-name="L71">
            <text:list-item>
              <text:p text:style-name="P143">Create a detailed script for any specific scenario with AP1000 comparisons? </text:p>
            </text:list-item>
            <text:list-item>
              <text:p text:style-name="P143">Design a slide deck outline with specific AP1000 visuals? </text:p>
            </text:list-item>
            <text:list-item>
              <text:p text:style-name="P143">Draft FAQ responses comparing AP1000 and SMR approaches? </text:p>
            </text:list-item>
            <text:list-item>
              <text:p text:style-name="P144">Create a "scenario comparison table" showing how AP1000 and your FHR respond to the same accidents? 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4:43:08.908452999</meta:creation-date>
    <dc:date>2026-05-11T14:44:33.564643912</dc:date>
    <meta:editing-duration>PT1M26S</meta:editing-duration>
    <meta:editing-cycles>1</meta:editing-cycles>
    <meta:document-statistic meta:table-count="2" meta:image-count="0" meta:object-count="0" meta:page-count="15" meta:paragraph-count="515" meta:word-count="3700" meta:character-count="24201" meta:non-whitespace-character-count="21044"/>
    <meta:generator>LibreOffice/26.2.3.2$Linux_X86_64 LibreOffice_project/620$Build-2</meta:generator>
  </office:meta>
</office:document-meta>
</file>